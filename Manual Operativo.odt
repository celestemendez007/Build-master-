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svg" manifest:media-type=""/>
  <manifest:file-entry manifest:full-path="media/image3.png" manifest:media-type="image/png"/>
  <manifest:file-entry manifest:full-path="media/image4.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Black" svg:font-family="Arial Black" style:font-family-generic="swiss" style:font-pitch="variable" svg:panose-1="2 11 10 4 2 1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Mincho" svg:font-family="Yu Mincho" style:font-family-generic="roman" style:font-pitch="variable" svg:panose-1="2 2 4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style>
    <style:style style:name="P14" style:parent-style-name="Normal" style:family="paragraph">
      <style:paragraph-properties fo:text-align="center"/>
      <style:text-properties style:font-name="Arial Black" fo:font-size="16pt" style:font-size-asian="16pt" style:font-size-complex="16pt"/>
    </style:style>
    <style:style style:name="P15" style:parent-style-name="Normal" style:family="paragraph">
      <style:paragraph-properties fo:text-align="center"/>
      <style:text-properties style:font-name="Arial Black" fo:font-size="16pt" style:font-size-asian="16pt" style:font-size-complex="16pt"/>
    </style:style>
    <style:style style:name="P16" style:parent-style-name="Normal" style:family="paragraph">
      <style:paragraph-properties fo:text-align="center"/>
    </style:style>
    <style:style style:name="P17" style:parent-style-name="Normal" style:family="paragraph">
      <style:paragraph-properties fo:text-align="center"/>
    </style:style>
    <style:style style:name="P18" style:parent-style-name="Normal" style:family="paragraph">
      <style:paragraph-properties fo:text-align="center"/>
    </style:style>
    <style:style style:name="P19" style:parent-style-name="Normal" style:family="paragraph">
      <style:paragraph-properties fo:text-align="center"/>
      <style:text-properties style:font-name="Arial Black" fo:color="#0070C0" fo:font-size="18pt" style:font-size-asian="18pt" style:font-size-complex="18pt"/>
    </style:style>
    <style:style style:name="P20" style:parent-style-name="Normal" style:family="paragraph">
      <style:paragraph-properties fo:text-align="center"/>
      <style:text-properties style:font-name="Arial Black" fo:color="#0070C0" fo:font-size="18pt" style:font-size-asian="18pt" style:font-size-complex="18pt"/>
    </style:style>
    <style:style style:name="P21" style:parent-style-name="Normal" style:family="paragraph">
      <style:paragraph-properties fo:text-align="center"/>
    </style:style>
    <style:style style:name="P22" style:parent-style-name="Normal" style:family="paragraph">
      <style:paragraph-properties fo:text-align="center"/>
      <style:text-properties style:font-name="Arial Black" fo:color="#0070C0" fo:font-size="16pt" style:font-size-asian="16pt" style:font-size-complex="16pt"/>
    </style:style>
    <style:style style:name="P23" style:parent-style-name="Normal" style:family="paragraph">
      <style:paragraph-properties fo:text-align="center"/>
      <style:text-properties style:font-name="Arial Black" fo:font-size="16pt" style:font-size-asian="16pt" style:font-size-complex="16pt"/>
    </style:style>
    <style:style style:name="P24" style:parent-style-name="Normal" style:family="paragraph">
      <style:paragraph-properties fo:text-align="center"/>
    </style:style>
    <style:style style:name="P25" style:parent-style-name="Normal" style:family="paragraph">
      <style:paragraph-properties fo:text-align="center"/>
    </style:style>
    <style:style style:name="P26" style:parent-style-name="Normal" style:family="paragraph">
      <style:paragraph-properties fo:text-align="center"/>
    </style:style>
    <style:style style:name="P27" style:parent-style-name="Normal" style:family="paragraph">
      <style:paragraph-properties fo:text-align="center"/>
    </style:style>
    <style:style style:name="P28" style:parent-style-name="Normal" style:family="paragraph">
      <style:paragraph-properties fo:text-align="center"/>
      <style:text-properties fo:font-size="18pt" style:font-size-asian="18pt" style:font-size-complex="18pt"/>
    </style:style>
    <style:style style:name="P29" style:parent-style-name="Normal" style:family="paragraph">
      <style:paragraph-properties fo:text-align="center"/>
      <style:text-properties fo:font-size="18pt" style:font-size-asian="18pt" style:font-size-complex="18pt"/>
    </style:style>
    <style:style style:name="P30" style:parent-style-name="Normal" style:family="paragraph">
      <style:paragraph-properties fo:text-align="center"/>
      <style:text-properties style:font-name="Arial Black" fo:font-size="16pt" style:font-size-asian="16pt" style:font-size-complex="16pt"/>
    </style:style>
    <style:style style:name="P31" style:parent-style-name="Normal" style:family="paragraph">
      <style:paragraph-properties fo:break-before="page"/>
    </style:style>
    <style:style style:name="P32" style:parent-style-name="TítuloTDC" style:family="paragraph">
      <style:paragraph-properties fo:text-align="center"/>
    </style:style>
    <style:style style:name="T33" style:parent-style-name="Fuentedepárrafopredeter." style:family="text">
      <style:text-properties style:letter-kerning="true" style:language-asian="en" style:country-asian="US"/>
    </style:style>
    <style:style style:name="T34" style:parent-style-name="Fuentedepárrafopredeter." style:family="text">
      <style:text-properties style:font-name="Arial Black" style:font-name-asian="Yu Mincho" style:font-name-complex="Arial" fo:color="#0070C0" style:language-asian="en" style:country-asian="US"/>
    </style:style>
    <style:style style:name="P35" style:parent-style-name="TDC1" style:family="paragraph">
      <style:paragraph-properties>
        <style:tab-stops>
          <style:tab-stop style:type="right" style:leader-style="dotted" style:leader-text="." style:position="6.9791in"/>
        </style:tab-stops>
      </style:paragraph-properties>
    </style:style>
    <style:style style:name="P36" style:parent-style-name="TDC1" style:family="paragraph">
      <style:paragraph-properties>
        <style:tab-stops>
          <style:tab-stop style:type="right" style:leader-style="dotted" style:leader-text="." style:position="6.9791in"/>
        </style:tab-stops>
      </style:paragraph-properties>
    </style:style>
    <style:style style:name="P37" style:parent-style-name="TDC1" style:family="paragraph">
      <style:paragraph-properties>
        <style:tab-stops>
          <style:tab-stop style:type="right" style:leader-style="dotted" style:leader-text="." style:position="6.9791in"/>
        </style:tab-stops>
      </style:paragraph-properties>
    </style:style>
    <style:style style:name="P38" style:parent-style-name="TDC1" style:family="paragraph">
      <style:paragraph-properties>
        <style:tab-stops>
          <style:tab-stop style:type="right" style:leader-style="dotted" style:leader-text="." style:position="6.9791in"/>
        </style:tab-stops>
      </style:paragraph-properties>
    </style:style>
    <style:style style:name="P39" style:parent-style-name="TDC1" style:family="paragraph">
      <style:paragraph-properties>
        <style:tab-stops>
          <style:tab-stop style:type="right" style:leader-style="dotted" style:leader-text="." style:position="6.9791in"/>
        </style:tab-stops>
      </style:paragraph-properties>
    </style:style>
    <style:style style:name="P40" style:parent-style-name="TDC1" style:family="paragraph">
      <style:paragraph-properties>
        <style:tab-stops>
          <style:tab-stop style:type="right" style:leader-style="dotted" style:leader-text="." style:position="6.9791in"/>
        </style:tab-stops>
      </style:paragraph-properties>
    </style:style>
    <style:style style:name="P41" style:parent-style-name="Normal" style:family="paragraph">
      <style:paragraph-properties fo:break-before="page"/>
    </style:style>
    <style:style style:name="P42" style:parent-style-name="Estilo1" style:family="paragraph">
      <style:paragraph-properties fo:text-align="center" fo:margin-top="0in"/>
      <style:text-properties fo:language="es" fo:country="SV"/>
    </style:style>
    <style:style style:name="T43" style:parent-style-name="Fuentedepárrafopredeter." style:family="text">
      <style:text-properties fo:language="es" fo:country="SV"/>
    </style:style>
    <style:style style:name="T44" style:parent-style-name="Fuentedepárrafopredeter." style:family="text">
      <style:text-properties fo:language="es" fo:country="SV"/>
    </style:style>
    <style:style style:name="P45" style:parent-style-name="Estilo1" style:family="paragraph">
      <style:paragraph-properties fo:text-align="center"/>
    </style:style>
    <style:style style:name="P46" style:parent-style-name="Estilo2" style:family="paragraph">
      <style:text-properties style:font-name="Arial Black" fo:color="#215E99"/>
    </style:style>
    <style:style style:name="P47" style:parent-style-name="Estilo2" style:family="paragraph">
      <style:text-properties style:font-name="Arial Black" fo:color="#215E99"/>
    </style:style>
    <style:style style:name="P48" style:parent-style-name="Estilo2" style:family="paragraph">
      <style:text-properties style:font-name="Arial Black" fo:color="#215E99"/>
    </style:style>
    <style:style style:name="P49" style:parent-style-name="Normal" style:family="paragraph">
      <style:paragraph-properties fo:break-before="page"/>
    </style:style>
    <style:style style:name="P50" style:parent-style-name="Estilo1" style:family="paragraph">
      <style:paragraph-properties fo:text-align="center" fo:margin-top="0in"/>
    </style:style>
    <style:style style:name="T51" style:parent-style-name="Fuentedepárrafopredeter." style:family="text">
      <style:text-properties fo:language="es" fo:country="SV"/>
    </style:style>
    <style:style style:name="T52" style:parent-style-name="Fuentedepárrafopredeter." style:family="text">
      <style:text-properties style:font-name="Arial Black" fo:color="#215E99"/>
    </style:style>
    <style:style style:name="T53" style:parent-style-name="Fuentedepárrafopredeter." style:family="text">
      <style:text-properties style:font-name="Arial Black" fo:color="#215E99" fo:language="es" fo:country="SV"/>
    </style:style>
    <style:style style:name="P54" style:parent-style-name="Estilo2" style:family="paragraph">
      <style:text-properties style:font-name="Arial Black" fo:color="#215E99"/>
    </style:style>
    <style:style style:name="P55" style:parent-style-name="Estilo2" style:list-style-name="LFO2" style:family="paragraph"/>
    <style:style style:name="P56" style:parent-style-name="Estilo2" style:list-style-name="LFO2" style:family="paragraph"/>
    <style:style style:name="P57" style:parent-style-name="Estilo2" style:list-style-name="LFO2" style:family="paragraph"/>
    <style:style style:name="P58" style:parent-style-name="Estilo2" style:list-style-name="LFO2" style:family="paragraph"/>
    <style:style style:name="P59" style:parent-style-name="Estilo2" style:list-style-name="LFO2" style:family="paragraph"/>
    <style:style style:name="P60" style:parent-style-name="Estilo2" style:list-style-name="LFO2" style:family="paragraph"/>
    <style:style style:name="P61" style:parent-style-name="Normal" style:family="paragraph">
      <style:paragraph-properties fo:break-before="page" fo:text-align="center"/>
    </style:style>
    <style:style style:name="P62" style:parent-style-name="Estilo1" style:family="paragraph">
      <style:paragraph-properties fo:text-align="center"/>
    </style:style>
    <style:style style:name="P63" style:parent-style-name="Estilo1" style:family="paragraph">
      <style:paragraph-properties fo:text-align="center"/>
    </style:style>
    <style:style style:name="TableColumn65" style:family="table-column">
      <style:table-column-properties style:column-width="1.059in"/>
    </style:style>
    <style:style style:name="TableColumn66" style:family="table-column">
      <style:table-column-properties style:column-width="1.375in"/>
    </style:style>
    <style:style style:name="TableColumn67" style:family="table-column">
      <style:table-column-properties style:column-width="4.5486in"/>
    </style:style>
    <style:style style:name="Table64" style:family="table">
      <style:table-properties style:width="6.9826in" fo:margin-left="0in" table:align="left"/>
    </style:style>
    <style:style style:name="TableRow68" style:family="table-row">
      <style:table-row-properties style:min-row-height="0.5in"/>
    </style:style>
    <style:style style:name="TableCell69" style:family="table-cell">
      <style:table-cell-properties fo:border="0.0069in solid #000000" style:writing-mode="lr-tb" style:vertical-align="middle" fo:padding-top="0in" fo:padding-left="0.075in" fo:padding-bottom="0in" fo:padding-right="0.075in"/>
    </style:style>
    <style:style style:name="P70" style:parent-style-name="Estilo2" style:family="paragraph">
      <style:paragraph-properties fo:margin-bottom="0in" fo:line-height="100%"/>
    </style:style>
    <style:style style:name="TableCell71" style:family="table-cell">
      <style:table-cell-properties fo:border="0.0069in solid #000000" style:writing-mode="lr-tb" style:vertical-align="middle" fo:padding-top="0in" fo:padding-left="0.075in" fo:padding-bottom="0in" fo:padding-right="0.075in"/>
    </style:style>
    <style:style style:name="P72" style:parent-style-name="Estilo2" style:family="paragraph">
      <style:paragraph-properties fo:margin-bottom="0in" fo:line-height="100%"/>
    </style:style>
    <style:style style:name="TableCell73" style:family="table-cell">
      <style:table-cell-properties fo:border="0.0069in solid #000000" style:writing-mode="lr-tb" style:vertical-align="middle" fo:padding-top="0in" fo:padding-left="0.075in" fo:padding-bottom="0in" fo:padding-right="0.075in"/>
    </style:style>
    <style:style style:name="P74" style:parent-style-name="Estilo2" style:family="paragraph">
      <style:paragraph-properties fo:margin-bottom="0in" fo:line-height="100%"/>
    </style:style>
    <style:style style:name="TableRow75" style:family="table-row">
      <style:table-row-properties style:min-row-height="0.5in"/>
    </style:style>
    <style:style style:name="TableCell76" style:family="table-cell">
      <style:table-cell-properties fo:border="0.0069in solid #000000" style:writing-mode="lr-tb" style:vertical-align="middle" fo:padding-top="0in" fo:padding-left="0.075in" fo:padding-bottom="0in" fo:padding-right="0.075in"/>
    </style:style>
    <style:style style:name="P77" style:parent-style-name="Estilo2" style:family="paragraph">
      <style:paragraph-properties fo:margin-bottom="0in" fo:line-height="100%"/>
    </style:style>
    <style:style style:name="TableCell78" style:family="table-cell">
      <style:table-cell-properties fo:border="0.0069in solid #000000" style:writing-mode="lr-tb" style:vertical-align="middle" fo:padding-top="0in" fo:padding-left="0.075in" fo:padding-bottom="0in" fo:padding-right="0.075in"/>
    </style:style>
    <style:style style:name="P79" style:parent-style-name="Estilo2" style:family="paragraph">
      <style:paragraph-properties fo:margin-bottom="0in" fo:line-height="100%"/>
    </style:style>
    <style:style style:name="TableCell80" style:family="table-cell">
      <style:table-cell-properties fo:border="0.0069in solid #000000" style:writing-mode="lr-tb" style:vertical-align="middle" fo:padding-top="0in" fo:padding-left="0.075in" fo:padding-bottom="0in" fo:padding-right="0.075in"/>
    </style:style>
    <style:style style:name="P81" style:parent-style-name="Estilo2" style:family="paragraph">
      <style:paragraph-properties fo:margin-bottom="0in" fo:line-height="100%"/>
    </style:style>
    <style:style style:name="TableRow82" style:family="table-row">
      <style:table-row-properties style:min-row-height="0.5in"/>
    </style:style>
    <style:style style:name="TableCell83" style:family="table-cell">
      <style:table-cell-properties fo:border="0.0069in solid #000000" style:writing-mode="lr-tb" style:vertical-align="middle" fo:padding-top="0in" fo:padding-left="0.075in" fo:padding-bottom="0in" fo:padding-right="0.075in"/>
    </style:style>
    <style:style style:name="P84" style:parent-style-name="Estilo2" style:family="paragraph">
      <style:paragraph-properties fo:margin-bottom="0in" fo:line-height="100%"/>
    </style:style>
    <style:style style:name="TableCell85" style:family="table-cell">
      <style:table-cell-properties fo:border="0.0069in solid #000000" style:writing-mode="lr-tb" style:vertical-align="middle" fo:padding-top="0in" fo:padding-left="0.075in" fo:padding-bottom="0in" fo:padding-right="0.075in"/>
    </style:style>
    <style:style style:name="P86" style:parent-style-name="Estilo2" style:family="paragraph">
      <style:paragraph-properties fo:margin-bottom="0in" fo:line-height="100%"/>
    </style:style>
    <style:style style:name="TableCell87" style:family="table-cell">
      <style:table-cell-properties fo:border="0.0069in solid #000000" style:writing-mode="lr-tb" style:vertical-align="middle" fo:padding-top="0in" fo:padding-left="0.075in" fo:padding-bottom="0in" fo:padding-right="0.075in"/>
    </style:style>
    <style:style style:name="P88" style:parent-style-name="Estilo2" style:family="paragraph">
      <style:paragraph-properties fo:margin-bottom="0in" fo:line-height="100%"/>
    </style:style>
    <style:style style:name="TableRow89" style:family="table-row">
      <style:table-row-properties style:min-row-height="0.5in"/>
    </style:style>
    <style:style style:name="TableCell90" style:family="table-cell">
      <style:table-cell-properties fo:border="0.0069in solid #000000" style:writing-mode="lr-tb" style:vertical-align="middle" fo:padding-top="0in" fo:padding-left="0.075in" fo:padding-bottom="0in" fo:padding-right="0.075in"/>
    </style:style>
    <style:style style:name="P91" style:parent-style-name="Estilo2" style:family="paragraph">
      <style:paragraph-properties fo:margin-bottom="0in" fo:line-height="100%"/>
    </style:style>
    <style:style style:name="TableCell92" style:family="table-cell">
      <style:table-cell-properties fo:border="0.0069in solid #000000" style:writing-mode="lr-tb" style:vertical-align="middle" fo:padding-top="0in" fo:padding-left="0.075in" fo:padding-bottom="0in" fo:padding-right="0.075in"/>
    </style:style>
    <style:style style:name="P93" style:parent-style-name="Estilo2" style:family="paragraph">
      <style:paragraph-properties fo:margin-bottom="0in" fo:line-height="100%"/>
    </style:style>
    <style:style style:name="TableCell94" style:family="table-cell">
      <style:table-cell-properties fo:border="0.0069in solid #000000" style:writing-mode="lr-tb" style:vertical-align="middle" fo:padding-top="0in" fo:padding-left="0.075in" fo:padding-bottom="0in" fo:padding-right="0.075in"/>
    </style:style>
    <style:style style:name="P95" style:parent-style-name="Estilo2" style:family="paragraph">
      <style:paragraph-properties fo:margin-bottom="0in" fo:line-height="100%"/>
    </style:style>
    <style:style style:name="TableRow96" style:family="table-row">
      <style:table-row-properties style:min-row-height="0.5in"/>
    </style:style>
    <style:style style:name="TableCell97" style:family="table-cell">
      <style:table-cell-properties fo:border="0.0069in solid #000000" style:writing-mode="lr-tb" style:vertical-align="middle" fo:padding-top="0in" fo:padding-left="0.075in" fo:padding-bottom="0in" fo:padding-right="0.075in"/>
    </style:style>
    <style:style style:name="P98" style:parent-style-name="Estilo2" style:family="paragraph">
      <style:paragraph-properties fo:margin-bottom="0in" fo:line-height="100%"/>
    </style:style>
    <style:style style:name="TableCell99" style:family="table-cell">
      <style:table-cell-properties fo:border="0.0069in solid #000000" style:writing-mode="lr-tb" style:vertical-align="middle" fo:padding-top="0in" fo:padding-left="0.075in" fo:padding-bottom="0in" fo:padding-right="0.075in"/>
    </style:style>
    <style:style style:name="P100" style:parent-style-name="Estilo2" style:family="paragraph">
      <style:paragraph-properties fo:margin-bottom="0in" fo:line-height="100%"/>
    </style:style>
    <style:style style:name="TableCell101" style:family="table-cell">
      <style:table-cell-properties fo:border="0.0069in solid #000000" style:writing-mode="lr-tb" style:vertical-align="middle" fo:padding-top="0in" fo:padding-left="0.075in" fo:padding-bottom="0in" fo:padding-right="0.075in"/>
    </style:style>
    <style:style style:name="P102" style:parent-style-name="Estilo2" style:family="paragraph">
      <style:paragraph-properties fo:margin-bottom="0in" fo:line-height="100%"/>
    </style:style>
    <style:style style:name="TableRow103" style:family="table-row">
      <style:table-row-properties style:min-row-height="0.5in"/>
    </style:style>
    <style:style style:name="TableCell104" style:family="table-cell">
      <style:table-cell-properties fo:border="0.0069in solid #000000" style:writing-mode="lr-tb" style:vertical-align="middle" fo:padding-top="0in" fo:padding-left="0.075in" fo:padding-bottom="0in" fo:padding-right="0.075in"/>
    </style:style>
    <style:style style:name="P105" style:parent-style-name="Estilo2" style:family="paragraph">
      <style:paragraph-properties fo:margin-bottom="0in" fo:line-height="100%"/>
    </style:style>
    <style:style style:name="TableCell106" style:family="table-cell">
      <style:table-cell-properties fo:border="0.0069in solid #000000" style:writing-mode="lr-tb" style:vertical-align="middle" fo:padding-top="0in" fo:padding-left="0.075in" fo:padding-bottom="0in" fo:padding-right="0.075in"/>
    </style:style>
    <style:style style:name="P107" style:parent-style-name="Estilo2" style:family="paragraph">
      <style:paragraph-properties fo:margin-bottom="0in" fo:line-height="100%"/>
    </style:style>
    <style:style style:name="TableCell108" style:family="table-cell">
      <style:table-cell-properties fo:border="0.0069in solid #000000" style:writing-mode="lr-tb" style:vertical-align="middle" fo:padding-top="0in" fo:padding-left="0.075in" fo:padding-bottom="0in" fo:padding-right="0.075in"/>
    </style:style>
    <style:style style:name="P109" style:parent-style-name="Estilo2" style:family="paragraph">
      <style:paragraph-properties fo:margin-bottom="0in" fo:line-height="100%"/>
    </style:style>
    <style:style style:name="TableRow110" style:family="table-row">
      <style:table-row-properties style:min-row-height="0.5in"/>
    </style:style>
    <style:style style:name="TableCell111" style:family="table-cell">
      <style:table-cell-properties fo:border="0.0069in solid #000000" style:writing-mode="lr-tb" style:vertical-align="middle" fo:padding-top="0in" fo:padding-left="0.075in" fo:padding-bottom="0in" fo:padding-right="0.075in"/>
    </style:style>
    <style:style style:name="P112" style:parent-style-name="Estilo2" style:family="paragraph">
      <style:paragraph-properties fo:margin-bottom="0in" fo:line-height="100%"/>
    </style:style>
    <style:style style:name="TableCell113" style:family="table-cell">
      <style:table-cell-properties fo:border="0.0069in solid #000000" style:writing-mode="lr-tb" style:vertical-align="middle" fo:padding-top="0in" fo:padding-left="0.075in" fo:padding-bottom="0in" fo:padding-right="0.075in"/>
    </style:style>
    <style:style style:name="P114" style:parent-style-name="Estilo2" style:family="paragraph">
      <style:paragraph-properties fo:margin-bottom="0in" fo:line-height="100%"/>
    </style:style>
    <style:style style:name="TableCell115" style:family="table-cell">
      <style:table-cell-properties fo:border="0.0069in solid #000000" style:writing-mode="lr-tb" style:vertical-align="middle" fo:padding-top="0in" fo:padding-left="0.075in" fo:padding-bottom="0in" fo:padding-right="0.075in"/>
    </style:style>
    <style:style style:name="P116" style:parent-style-name="Estilo2" style:family="paragraph">
      <style:paragraph-properties fo:margin-bottom="0in" fo:line-height="100%"/>
    </style:style>
    <style:style style:name="TableRow117" style:family="table-row">
      <style:table-row-properties style:min-row-height="0.5in"/>
    </style:style>
    <style:style style:name="TableCell118" style:family="table-cell">
      <style:table-cell-properties fo:border="0.0069in solid #000000" style:writing-mode="lr-tb" style:vertical-align="middle" fo:padding-top="0in" fo:padding-left="0.075in" fo:padding-bottom="0in" fo:padding-right="0.075in"/>
    </style:style>
    <style:style style:name="P119" style:parent-style-name="Estilo2" style:family="paragraph">
      <style:paragraph-properties fo:margin-bottom="0in" fo:line-height="100%"/>
    </style:style>
    <style:style style:name="TableCell120" style:family="table-cell">
      <style:table-cell-properties fo:border="0.0069in solid #000000" style:writing-mode="lr-tb" style:vertical-align="middle" fo:padding-top="0in" fo:padding-left="0.075in" fo:padding-bottom="0in" fo:padding-right="0.075in"/>
    </style:style>
    <style:style style:name="P121" style:parent-style-name="Estilo2" style:family="paragraph">
      <style:paragraph-properties fo:margin-bottom="0in" fo:line-height="100%"/>
    </style:style>
    <style:style style:name="TableCell122" style:family="table-cell">
      <style:table-cell-properties fo:border="0.0069in solid #000000" style:writing-mode="lr-tb" style:vertical-align="middle" fo:padding-top="0in" fo:padding-left="0.075in" fo:padding-bottom="0in" fo:padding-right="0.075in"/>
    </style:style>
    <style:style style:name="P123" style:parent-style-name="Estilo2" style:family="paragraph">
      <style:paragraph-properties fo:margin-bottom="0in" fo:line-height="100%"/>
    </style:style>
    <style:style style:name="TableRow124" style:family="table-row">
      <style:table-row-properties style:min-row-height="0.5in"/>
    </style:style>
    <style:style style:name="TableCell125" style:family="table-cell">
      <style:table-cell-properties fo:border="0.0069in solid #000000" style:writing-mode="lr-tb" style:vertical-align="middle" fo:padding-top="0in" fo:padding-left="0.075in" fo:padding-bottom="0in" fo:padding-right="0.075in"/>
    </style:style>
    <style:style style:name="P126" style:parent-style-name="Estilo2" style:family="paragraph">
      <style:paragraph-properties fo:margin-bottom="0in" fo:line-height="100%"/>
    </style:style>
    <style:style style:name="TableCell127" style:family="table-cell">
      <style:table-cell-properties fo:border="0.0069in solid #000000" style:writing-mode="lr-tb" style:vertical-align="middle" fo:padding-top="0in" fo:padding-left="0.075in" fo:padding-bottom="0in" fo:padding-right="0.075in"/>
    </style:style>
    <style:style style:name="P128" style:parent-style-name="Estilo2" style:family="paragraph">
      <style:paragraph-properties fo:margin-bottom="0in" fo:line-height="100%"/>
    </style:style>
    <style:style style:name="TableCell129" style:family="table-cell">
      <style:table-cell-properties fo:border="0.0069in solid #000000" style:writing-mode="lr-tb" style:vertical-align="middle" fo:padding-top="0in" fo:padding-left="0.075in" fo:padding-bottom="0in" fo:padding-right="0.075in"/>
    </style:style>
    <style:style style:name="P130" style:parent-style-name="Estilo2" style:family="paragraph">
      <style:paragraph-properties fo:margin-bottom="0in" fo:line-height="100%"/>
    </style:style>
    <style:style style:name="P131" style:parent-style-name="Normal" style:family="paragraph">
      <style:paragraph-properties fo:break-before="page"/>
    </style:style>
    <style:style style:name="P132" style:parent-style-name="Estilo1" style:family="paragraph">
      <style:paragraph-properties fo:text-align="center"/>
    </style:style>
    <style:style style:name="P133" style:parent-style-name="Estilo2" style:family="paragraph">
      <style:text-properties style:font-name="Arial Black" fo:color="#215E99" fo:language="es" fo:country="SV"/>
    </style:style>
    <style:style style:name="P134" style:parent-style-name="Estilo2" style:family="paragraph">
      <style:text-properties fo:font-weight="bold" style:font-weight-asian="bold" style:font-weight-complex="bold"/>
    </style:style>
    <style:style style:name="T135" style:parent-style-name="Fuentedepárrafopredeter." style:family="text">
      <style:text-properties fo:font-weight="bold" style:font-weight-asian="bold" style:font-weight-complex="bold"/>
    </style:style>
    <style:style style:name="T136" style:parent-style-name="Fuentedepárrafopredeter." style:family="text">
      <style:text-properties fo:font-weight="bold" style:font-weight-asian="bold" style:font-weight-complex="bold"/>
    </style:style>
    <style:style style:name="P137" style:parent-style-name="Estilo2" style:family="paragraph">
      <style:text-properties fo:font-weight="bold" style:font-weight-asian="bold" style:font-weight-complex="bold"/>
    </style:style>
    <style:style style:name="P138" style:parent-style-name="Estilo2" style:family="paragraph">
      <style:paragraph-properties fo:text-indent="0.4916in"/>
    </style:style>
    <style:style style:name="P139" style:parent-style-name="Estilo2" style:family="paragraph">
      <style:paragraph-properties fo:text-indent="0.4916in"/>
    </style:style>
    <style:style style:name="P140" style:parent-style-name="Estilo2" style:family="paragraph">
      <style:paragraph-properties fo:text-indent="0.4916in"/>
    </style:style>
    <style:style style:name="P141" style:parent-style-name="Estilo2" style:family="paragraph">
      <style:paragraph-properties fo:text-indent="0.4916in"/>
    </style:style>
    <style:style style:name="P142" style:parent-style-name="Estilo2" style:family="paragraph">
      <style:text-properties style:font-name="Arial Black" fo:color="#215E99" fo:language="es" fo:country="SV"/>
    </style:style>
    <style:style style:name="T143" style:parent-style-name="Fuentedepárrafopredeter." style:family="text">
      <style:text-properties fo:font-weight="bold" style:font-weight-asian="bold" style:font-weight-complex="bold"/>
    </style:style>
    <style:style style:name="T144" style:parent-style-name="Fuentedepárrafopredeter." style:family="text">
      <style:text-properties fo:font-weight="bold" style:font-weight-asian="bold" style:font-weight-complex="bold"/>
    </style:style>
    <style:style style:name="P145" style:parent-style-name="Estilo2" style:family="paragraph">
      <style:text-properties fo:font-weight="bold" style:font-weight-asian="bold" style:font-weight-complex="bold"/>
    </style:style>
    <style:style style:name="P146" style:parent-style-name="Estilo2" style:family="paragraph">
      <style:paragraph-properties fo:text-indent="0.4916in"/>
    </style:style>
    <style:style style:name="P147" style:parent-style-name="Estilo2" style:family="paragraph">
      <style:paragraph-properties fo:text-indent="0.4916in"/>
    </style:style>
    <style:style style:name="P148" style:parent-style-name="Estilo2" style:family="paragraph">
      <style:paragraph-properties fo:text-indent="0.4916in"/>
    </style:style>
    <style:style style:name="P149" style:parent-style-name="Estilo2" style:family="paragraph">
      <style:paragraph-properties fo:text-indent="0.4916in"/>
    </style:style>
    <style:style style:name="P150" style:parent-style-name="Estilo2" style:family="paragraph">
      <style:paragraph-properties fo:text-indent="0.4916in"/>
    </style:style>
    <style:style style:name="P151" style:parent-style-name="Estilo2" style:family="paragraph">
      <style:text-properties style:font-name="Arial Black" fo:color="#215E99" fo:language="es" fo:country="SV"/>
    </style:style>
    <style:style style:name="P152" style:parent-style-name="Estilo2" style:family="paragraph">
      <style:text-properties style:font-name="Arial Black" fo:color="#215E99" fo:language="es" fo:country="SV"/>
    </style:style>
    <style:style style:name="P153" style:parent-style-name="Estilo2" style:family="paragraph">
      <style:text-properties style:font-name="Arial Black" fo:color="#215E99" fo:language="es" fo:country="SV"/>
    </style:style>
    <style:style style:name="T154" style:parent-style-name="Fuentedepárrafopredeter." style:family="text">
      <style:text-properties fo:font-weight="bold" style:font-weight-asian="bold" style:font-weight-complex="bold" fo:color="#215E99"/>
    </style:style>
    <style:style style:name="T155" style:parent-style-name="Fuentedepárrafopredeter." style:family="text">
      <style:text-properties fo:color="#215E99"/>
    </style:style>
    <style:style style:name="T156" style:parent-style-name="Fuentedepárrafopredeter." style:family="text">
      <style:text-properties fo:color="#215E99"/>
    </style:style>
    <style:style style:name="P157" style:parent-style-name="Estilo2" style:family="paragraph">
      <style:text-properties style:font-name="Arial Black" fo:color="#215E99" fo:language="es" fo:country="SV"/>
    </style:style>
    <style:style style:name="P158" style:parent-style-name="Estilo2" style:family="paragraph">
      <style:paragraph-properties fo:text-indent="0.4916in"/>
    </style:style>
    <style:style style:name="P159" style:parent-style-name="Estilo2" style:family="paragraph">
      <style:paragraph-properties fo:text-indent="0.4916in"/>
    </style:style>
    <style:style style:name="P160" style:parent-style-name="Estilo2" style:family="paragraph">
      <style:paragraph-properties fo:text-indent="0.4916in"/>
    </style:style>
    <style:style style:name="P161" style:parent-style-name="Estilo2" style:family="paragraph">
      <style:text-properties style:font-name="Arial Black" fo:color="#215E99" fo:language="es" fo:country="SV"/>
    </style:style>
    <style:style style:name="P162" style:parent-style-name="Estilo2" style:family="paragraph">
      <style:paragraph-properties fo:text-indent="0.4916in"/>
    </style:style>
    <style:style style:name="P163" style:parent-style-name="Estilo2" style:family="paragraph">
      <style:paragraph-properties fo:text-indent="0.4916in"/>
    </style:style>
    <style:style style:name="P164" style:parent-style-name="Estilo2" style:family="paragraph">
      <style:paragraph-properties fo:text-indent="0.4916in"/>
    </style:style>
    <style:style style:name="P165" style:parent-style-name="Estilo2" style:family="paragraph">
      <style:text-properties style:font-name="Arial Black" fo:color="#215E99" fo:language="es" fo:country="SV"/>
    </style:style>
    <style:style style:name="P166" style:parent-style-name="Estilo2" style:family="paragraph">
      <style:paragraph-properties fo:text-indent="0.4916in"/>
    </style:style>
    <style:style style:name="P167" style:parent-style-name="Estilo2" style:family="paragraph">
      <style:paragraph-properties fo:text-indent="0.4916in"/>
    </style:style>
    <style:style style:name="P168" style:parent-style-name="Estilo2" style:family="paragraph">
      <style:paragraph-properties fo:text-indent="0.4916in"/>
    </style:style>
    <style:style style:name="T169" style:parent-style-name="Fuentedepárrafopredeter." style:family="text">
      <style:text-properties fo:color="#215E99"/>
    </style:style>
    <style:style style:name="T170" style:parent-style-name="Fuentedepárrafopredeter." style:family="text">
      <style:text-properties fo:color="#215E99"/>
    </style:style>
    <style:style style:name="P171" style:parent-style-name="Estilo2" style:family="paragraph">
      <style:text-properties style:font-name="Arial Black" fo:color="#215E99" fo:language="es" fo:country="SV"/>
    </style:style>
    <style:style style:name="P172" style:parent-style-name="Estilo2" style:family="paragraph">
      <style:paragraph-properties fo:break-before="page"/>
    </style:style>
    <style:style style:family="graphic" style:name="a2" style:parent-style-name="Graphics">
      <style:graphic-properties fo:border="none" fo:background-color="transparent"/>
    </style:style>
  </office:automatic-styles>
  <office:body>
    <office:text text:use-soft-page-breaks="true">
      <text:p text:style-name="P1"/>
      <text:p text:style-name="P14">GRUPO ECON, S.A. de C.V.</text:p>
      <text:p text:style-name="P15">Bridge Master</text:p>
      <text:p text:style-name="P16"/>
      <text:p text:style-name="P17"/>
      <text:p text:style-name="P18"><draw:frame draw:style-name="a2" draw:name="Gráfico 1" text:anchor-type="as-char" svg:x="0in" svg:y="0in" svg:width="3.99306in" svg:height="1.24792in" style:rel-width="scale" style:rel-height="scale"><draw:image xlink:href="media/image1.png" xlink:type="simple" xlink:show="embed" xlink:actuate="onLoad"/><svg:title/><svg:desc/></draw:frame></text:p>
      <text:p text:style-name="P19"/>
      <text:p text:style-name="P20"/>
      <text:p text:style-name="P21"/>
      <text:p text:style-name="P22">Manual Operativo de<text:s/>Experiencias en el<text:s/>Bridge Master</text:p>
      <text:p text:style-name="P23">Edición 2026</text:p>
      <text:p text:style-name="P24"/>
      <text:p text:style-name="P25"/>
      <text:p text:style-name="P26"/>
      <text:p text:style-name="P27"/>
      <text:p text:style-name="P28"/>
      <text:p text:style-name="P29"/>
      <text:p text:style-name="P30">Elaborado<text:s/>junio – agosto<text:s/>2026</text:p>
      <text:p text:style-name="P31"/>
      <text:p text:style-name="P32"><text:span text:style-name="T33">￼</text:span><text:span text:style-name="T34">Contenido</text:span></text:p>
      <text:p text:style-name="Normal"/>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5"><text:a xlink:href="#_Toc1996820576" office:target-frame-name="_top" xlink:show="replace"><text:span text:style-name="Hipervínculo">Presentación</text:span><text:tab/><text:span text:style-name="Hipervínculo">2</text:span></text:a></text:p>
          <text:p text:style-name="P36"><text:a xlink:href="#_Toc968828586" office:target-frame-name="_top" xlink:show="replace"><text:span text:style-name="Hipervínculo">¿Qué es Bridge Master?</text:span><text:tab/><text:span text:style-name="Hipervínculo">3</text:span></text:a></text:p>
          <text:p text:style-name="P37"><text:a xlink:href="#_Toc159835267" office:target-frame-name="_top" xlink:show="replace"><text:span text:style-name="Hipervínculo">Objetivos</text:span><text:tab/><text:span text:style-name="Hipervínculo">4</text:span></text:a></text:p>
          <text:p text:style-name="P38"><text:a xlink:href="#_Toc1611472860" office:target-frame-name="_top" xlink:show="replace"><text:span text:style-name="Hipervínculo">Cronograma</text:span><text:tab/><text:span text:style-name="Hipervínculo">5</text:span></text:a></text:p>
          <text:p text:style-name="P39"><text:a xlink:href="#_Toc1529764438" office:target-frame-name="_top" xlink:show="replace"><text:span text:style-name="Hipervínculo">Experiencias</text:span><text:tab/><text:span text:style-name="Hipervínculo">6</text:span></text:a></text:p>
          <text:p text:style-name="P40"><text:a xlink:href="#_Toc743050743" office:target-frame-name="_top" xlink:show="replace"><text:span text:style-name="Hipervínculo">Bibliografía</text:span><text:tab/><text:span text:style-name="Hipervínculo">11</text:span></text:a></text:p>
        </text:index-body>
      </text:table-of-content>
      <text:p text:style-name="Normal"/>
      <text:p text:style-name="P41"/>
      <text:h text:style-name="P42" text:outline-level="1"><text:bookmark-start text:name="_Toc1996820576"/>Presentación<text:bookmark-end text:name="_Toc1996820576"/></text:h>
      <text:p text:style-name="Normal"/>
      <text:p text:style-name="Estilo2">El presente manual ha sido elaborado con el propósito de llevar un registro de las actividades y la metodología del proyecto Bridge Master; pero, más importante aún, de permitir que dicho programa<text:s/>pueda ser replicado<text:s/>en futuras ediciones. Asimismo, busca recopilar y organizar toda la información relevante relacionada con el diseño, la planificación y la ejecución del programa.</text:p>
      <text:p text:style-name="Estilo2">El programa descrito en este documento tiene como objetivo brindar a los estudiantes participantes de la Master Class y las Mentorías Bridge Master los conocimientos fundamentales de ingeniería, estructuras y trabajo en equipo necesarios para enfrentar la competencia de diseño y construcción de puentes.</text:p>
      <text:p text:style-name="Estilo2">Esta preparación busca reforzar la base técnica de los estudiantes y, especialmente, familiarizarlos con los criterios de evaluación, los tipos de puentes y el formato de los retos que enfrentarán durante la competencia.</text:p>
      <text:p text:style-name="Estilo2">Este material es propiedad de<text:s/><text:span text:style-name="T43">GRUPO ECON, S.A. de C.V.</text:span><text:span text:style-name="T44"><text:s/></text:span>y podrá ser utilizado por la institución según lo considere conveniente, ya sea para fines formativos, institucionales o comunitarios.</text:p>
      <text:p text:style-name="Estilo2">Esperamos que el contenido y desarrollo del presente programa sea de su agrado. Agradecemos de antemano cualquier comentario, sugerencia o retroalimentación que contribuya a su mejora continua.</text:p>
      <text:p text:style-name="Estilo2"/>
      <text:p text:style-name="Estilo2">Atentamente</text:p>
      <text:p text:style-name="Estilo2">Bridge Master Team</text:p>
      <text:p text:style-name="Estilo2"/>
      <text:p text:style-name="Estilo2"/>
      <text:p text:style-name="Estilo2"/>
      <text:p text:style-name="Estilo2"/>
      <text:p text:style-name="Estilo2"/>
      <text:p text:style-name="Estilo2"/>
      <text:h text:style-name="P45" text:outline-level="1"><text:bookmark-start text:name="_Toc968828586"/>¿Qué es Bridge Master?<text:bookmark-end text:name="_Toc968828586"/></text:h>
      <text:p text:style-name="P46">Historia</text:p>
      <text:p text:style-name="Estilo2">Bridge Master nació en 2025 como una iniciativa para acercar a los estudiantes salvadoreños al mundo de la ingeniería y la construcción a través de una competencia práctica de diseño y construcción de puentes a escala. La primera edición se desarrolló convocando a cuatro centros educativos: Centro Escolar Walter Thilo Deininger, Centro Escolar Pedro Pablo Castillo, Centro Escolar Hacienda Florencia y Centro Escolar Cantón Nazareth.</text:p>
      <text:p text:style-name="Estilo2">A partir de los resultados y aprendizajes de esa primera edición, Bridge Master 2026 escala el proyecto: se amplía a tres niveles educativos (Tercer Ciclo, Bachillerato Técnico y Educación Superior), incorpora más instituciones participantes y traslada la competencia a una nueva sede estratégica, el CUBO<text:s/></text:p>
      <text:p text:style-name="Estilo2">(Centro Urbano de Bienestar y Oportunidades), en Colonia IVU.</text:p>
      <text:p text:style-name="P47">Propósito</text:p>
      <text:p text:style-name="Estilo2">Bridge Master es una competencia académica y formativa que busca construir puentes —en sentido literal y simbólico— entre el conocimiento estudiantil y el entorno empresarial. Su propósito central es conectar el talento joven con oportunidades reales del sector de la construcción a través de la educación, despertando la curiosidad por la ingeniería y la arquitectura, y fortaleciendo los vínculos de colaboración entre la industria y el sector educativo.</text:p>
      <text:p text:style-name="P48">Valores</text:p>
      <text:p text:style-name="Estilo2">Innovación — Fomentar la creatividad y el pensamiento original en el diseño y construcción de soluciones estructurales.</text:p>
      <text:p text:style-name="Estilo2">Integridad — Actuar con honestidad, respeto a las reglas y juego limpio en cada etapa de la competencia.</text:p>
      <text:p text:style-name="Estilo2">Liderazgo — Desarrollar la capacidad de guiar equipos, tomar decisiones y asumir responsabilidad ante los retos del proyecto.</text:p>
      <text:p text:style-name="Estilo2"/>
      <text:p text:style-name="P49"/>
      <text:h text:style-name="P50" text:outline-level="1"><text:bookmark-start text:name="_Toc159835267"/><text:span text:style-name="T51">Objetivos</text:span><text:bookmark-end text:name="_Toc159835267"/></text:h>
      <text:p text:style-name="Estilo2"><text:span text:style-name="T52">Objetivo<text:s/></text:span><text:span text:style-name="T53">General</text:span></text:p>
      <text:p text:style-name="Estilo2">Fortalecer el vínculo entre la educación y la industria de la construcción, conectando el talento estudiantil con oportunidades reales del sector a través de una experiencia educativa y competitiva que despierte el interés por la ingeniería y la arquitectura.</text:p>
      <text:p text:style-name="P54">Objetivos Específicos</text:p>
      <text:list text:style-name="LFO2" text:continue-numbering="true">
        <text:list-item>
          <text:p text:style-name="P55">Despertar la curiosidad de los estudiantes por la ingeniería y la arquitectura mediante experiencias prácticas de diseño y construcción de puentes.</text:p>
        </text:list-item>
        <text:list-item>
          <text:p text:style-name="P56">Maximizar el impacto social del programa, priorizando la participación de centros educativos.</text:p>
        </text:list-item>
        <text:list-item>
          <text:p text:style-name="P57">Fortalecer los vínculos de colaboración entre la industria y el sector educativo, promoviendo el trabajo en equipo entre estudiantes, docentes y mentores.</text:p>
        </text:list-item>
        <text:list-item>
          <text:p text:style-name="P58">Aumentar el engagement y la participación activa de los estudiantes durante todas las etapas del programa.</text:p>
        </text:list-item>
        <text:list-item>
          <text:p text:style-name="P59">Generar una experiencia memorable y significativa para cada participante, desde su primer acercamiento al programa hasta el día de la competencia.</text:p>
        </text:list-item>
        <text:list-item>
          <text:p text:style-name="P60">Incrementar la dinámica y el atractivo de la competencia mediante retos de velocidad, estrategia y diseño bajo presión.</text:p>
        </text:list-item>
      </text:list>
      <text:p text:style-name="P61"/>
      <text:h text:style-name="P62" text:outline-level="1"><text:bookmark-start text:name="_Toc1611472860"/>Cronograma<text:bookmark-end text:name="_Toc1611472860"/></text:h>
      <text:h text:style-name="P63" text:outline-level="1"/>
      <table:table table:style-name="Table64">
        <table:table-columns>
          <table:table-column table:style-name="TableColumn65"/>
          <table:table-column table:style-name="TableColumn66"/>
          <table:table-column table:style-name="TableColumn67"/>
        </table:table-columns>
        <table:table-row table:style-name="TableRow68">
          <table:table-cell table:style-name="TableCell69">
            <text:p text:style-name="P70">Mes</text:p>
          </table:table-cell>
          <table:table-cell table:style-name="TableCell71">
            <text:p text:style-name="P72">Semana</text:p>
          </table:table-cell>
          <table:table-cell table:style-name="TableCell73">
            <text:p text:style-name="P74">Actividad</text:p>
          </table:table-cell>
        </table:table-row>
        <table:table-row table:style-name="TableRow75">
          <table:table-cell table:style-name="TableCell76">
            <text:p text:style-name="P77">Junio</text:p>
          </table:table-cell>
          <table:table-cell table:style-name="TableCell78">
            <text:p text:style-name="P79">22 – 26</text:p>
          </table:table-cell>
          <table:table-cell table:style-name="TableCell80">
            <text:p text:style-name="P81">Investigación</text:p>
          </table:table-cell>
        </table:table-row>
        <table:table-row table:style-name="TableRow82">
          <table:table-cell table:style-name="TableCell83">
            <text:p text:style-name="P84">Junio</text:p>
          </table:table-cell>
          <table:table-cell table:style-name="TableCell85">
            <text:p text:style-name="P86">29 – 3 (jul)</text:p>
          </table:table-cell>
          <table:table-cell table:style-name="TableCell87">
            <text:p text:style-name="P88">Preparación Material Didáctico</text:p>
          </table:table-cell>
        </table:table-row>
        <table:table-row table:style-name="TableRow89">
          <table:table-cell table:style-name="TableCell90">
            <text:p text:style-name="P91">Julio</text:p>
          </table:table-cell>
          <table:table-cell table:style-name="TableCell92">
            <text:p text:style-name="P93">6 – 10</text:p>
          </table:table-cell>
          <table:table-cell table:style-name="TableCell94">
            <text:p text:style-name="P95">Master Class Profesores</text:p>
          </table:table-cell>
        </table:table-row>
        <table:table-row table:style-name="TableRow96">
          <table:table-cell table:style-name="TableCell97">
            <text:p text:style-name="P98">Julio</text:p>
          </table:table-cell>
          <table:table-cell table:style-name="TableCell99">
            <text:p text:style-name="P100">13 – 17</text:p>
          </table:table-cell>
          <table:table-cell table:style-name="TableCell101">
            <text:p text:style-name="P102">Preparación Material Didáctico</text:p>
          </table:table-cell>
        </table:table-row>
        <table:table-row table:style-name="TableRow103">
          <table:table-cell table:style-name="TableCell104">
            <text:p text:style-name="P105">Julio</text:p>
          </table:table-cell>
          <table:table-cell table:style-name="TableCell106">
            <text:p text:style-name="P107">20 – 24</text:p>
          </table:table-cell>
          <table:table-cell table:style-name="TableCell108">
            <text:p text:style-name="P109">Workshop<text:s/>Alumnos<text:s/>3 fechas presencial en el CUBO</text:p>
          </table:table-cell>
        </table:table-row>
        <table:table-row table:style-name="TableRow110">
          <table:table-cell table:style-name="TableCell111">
            <text:p text:style-name="P112">Julio</text:p>
          </table:table-cell>
          <table:table-cell table:style-name="TableCell113">
            <text:p text:style-name="P114">27 – 31</text:p>
          </table:table-cell>
          <table:table-cell table:style-name="TableCell115">
            <text:p text:style-name="P116">Workshop Alumnos 3 fechas presencial en el CUBO</text:p>
          </table:table-cell>
        </table:table-row>
        <table:table-row table:style-name="TableRow117">
          <table:table-cell table:style-name="TableCell118">
            <text:p text:style-name="P119">Agosto</text:p>
          </table:table-cell>
          <table:table-cell table:style-name="TableCell120">
            <text:p text:style-name="P121">3 – 7</text:p>
          </table:table-cell>
          <table:table-cell table:style-name="TableCell122">
            <text:p text:style-name="P123">Capacitación Staff</text:p>
          </table:table-cell>
        </table:table-row>
        <table:table-row table:style-name="TableRow124">
          <table:table-cell table:style-name="TableCell125">
            <text:p text:style-name="P126">Agosto</text:p>
          </table:table-cell>
          <table:table-cell table:style-name="TableCell127">
            <text:p text:style-name="P128">10 – 14</text:p>
          </table:table-cell>
          <table:table-cell table:style-name="TableCell129">
            <text:p text:style-name="P130">Semana de Competencia (11, 13 y 15 de agosto)</text:p>
          </table:table-cell>
        </table:table-row>
      </table:table>
      <text:p text:style-name="P131"/>
      <text:h text:style-name="P132" text:outline-level="1"><text:bookmark-start text:name="_Toc1529764438"/>Experiencias<text:bookmark-end text:name="_Toc1529764438"/></text:h>
      <text:p text:style-name="Estilo2"/>
      <text:p text:style-name="Estilo2">Plan de Experiencias: Proyecto Bridge Master 2026</text:p>
      <text:p text:style-name="Estilo2">Visión General del Proyecto:</text:p>
      <text:p text:style-name="Estilo2">Bridge Master es una competencia estratégica de diseño y construcción que busca despertar la curiosidad por la ingeniería y la arquitectura en Niñas, Niños, Adolescentes y Jóvenes (NNAJ), creando puentes entre los estudiantes y la industria.</text:p>
      <text:p text:style-name="P133">1. Invitación para Docentes (Master Class OPAMSS)</text:p>
      <text:p text:style-name="Estilo2">Actividad dirigida a los profesores representantes de las instituciones.</text:p>
      <text:p text:style-name="P134">Fecha programada:<text:s/>7 Julio</text:p>
      <text:p text:style-name="Estilo2"><text:span text:style-name="T135">Público:</text:span><text:s/>Profesores y directores de las instituciones participantes (Tercer Ciclo, Bachillerato y Educación Superior).</text:p>
      <text:p text:style-name="Estilo2"><text:span text:style-name="T136">Duración:</text:span><text:s text:c="2"/>horas.</text:p>
      <text:p text:style-name="P137">Objetivos:</text:p>
      <text:p text:style-name="P138">Presentar la visión y los objetivos principales de Bridge Master 2026.</text:p>
      <text:p text:style-name="P139">Exponer los conceptos clave y las habilidades (blandas y técnicas) que los NNAJ van a desarrollar durante el reto.</text:p>
      <text:p text:style-name="P140">Proporcionar a los docentes el marco de conocimientos técnicos necesarios.</text:p>
      <text:p text:style-name="P141">Entregar los manuales oficiales,<text:s/>proceso de selección,<text:s/>reglamento de la competecia<text:s/>(dimensiones, materiales, etc.) e información del kit.</text:p>
      <text:p text:style-name="Estilo2">Que se les recompensé como incentivo en las notas, y se les darán diplomas de participación</text:p>
      <text:p text:style-name="Estilo2"/>
      <text:p text:style-name="P142">2. BM Selección (Fase de Reclutamiento de Alumnos)</text:p>
      <text:p text:style-name="Estilo2"><text:span text:style-name="T143">Público:</text:span><text:s/>Alumnos interesados de las instituciones convocadas.</text:p>
      <text:p text:style-name="Estilo2"><text:span text:style-name="T144">Duración:</text:span><text:s/>2 horas.</text:p>
      <text:p text:style-name="P145">Objetivos:</text:p>
      <text:p text:style-name="P146">Presentar los objetivos de la competencia y revelar los incentivos para atraer y motivar al grupo estudiantil.</text:p>
      <text:p text:style-name="P147">Identificar perfiles destacados mediante un mini-reto evaluativo.</text:p>
      <text:p text:style-name="P148">Comentar el día que se convocará el equipo oficial (máximo de integrantes según reglas) que representará a la institución.</text:p>
      <text:p text:style-name="Estilo2">Actividades propuestas:</text:p>
      <text:p text:style-name="P149">Reto rápido de habilidades: Boceto de un puente en equipo.</text:p>
      <text:p text:style-name="P150">Evaluación de perfil: Pregunta para evaluar la motivación para participar en el evento.</text:p>
      <text:p text:style-name="Estilo2">La evaluación y selección del equipo tentativamente será realizada por los docentes sin embargo Bridge<text:s/>Master<text:s/>Team brindará las herramientas para que está sea una evaluación lo más integral posible.</text:p>
      <text:p text:style-name="Estilo2"/>
      <text:p text:style-name="Estilo2"/>
      <text:p text:style-name="Estilo2"/>
      <text:p text:style-name="P151">3. Capacitación STAFF y Mentores (Bridge Master)</text:p>
      <text:p text:style-name="Estilo2">Actividad interna preparatoria para el equipo organizador.</text:p>
      <text:p text:style-name="Estilo2">Público: Mentores, expertos de la industria y Staff de Bridge Master.</text:p>
      <text:p text:style-name="Estilo2">Duración Sugerida: 2 a 3 horas.</text:p>
      <text:p text:style-name="Estilo2">Objetivos:</text:p>
      <text:p text:style-name="Estilo2">Definición clara y asignación de roles operativos para el día del evento:</text:p>
      <text:p text:style-name="Estilo2">Mentores: Guías técnicos para los estudiantes.</text:p>
      <text:p text:style-name="Estilo2">Staff de Logística: Encargados de entrega de kits oficiales y gestión del espacio (CUBO IVU).</text:p>
      <text:p text:style-name="Estilo2">Marketing y Agencias: Responsables de la campaña audiovisual (Reveal, Teasers, Live Event) y recopilación de videos Reel/TikTok de los participantes.</text:p>
      <text:p text:style-name="Estilo2">Jueces: Expertos de la industria encargados de evaluar la ponderación (Resistencia 30%, Diseño 25%, Trabajo en equipo 25%, Video 20%).</text:p>
      <text:p text:style-name="Estilo2"/>
      <text:p text:style-name="P152">4. Master Class (Mentoría Estudiantes)</text:p>
      <text:p text:style-name="Estilo2">Jornada de capacitación intensiva previa a la competencia final.</text:p>
      <text:p text:style-name="Estilo2">Fecha programada: </text:p>
      <text:p text:style-name="Estilo2">Público: Equipos de alumnos seleccionados.</text:p>
      <text:p text:style-name="Estilo2">Duración: 4 horas.</text:p>
      <text:p text:style-name="Estilo2">Objetivos:</text:p>
      <text:p text:style-name="Estilo2">Desarrollar en los estudiantes las competencias y habilidades necesarias para enfrentar el reto presencial.</text:p>
      <text:p text:style-name="Estilo2">Impartir conceptos importantes sobre estructuras según su nivel: Viga (Nivel 1), Arco (Nivel 2) y Atirantado (Nivel 3).</text:p>
      <text:p text:style-name="Estilo2">Explicar el proceso de diseño, la optimización de materiales (paletas, silicón, hilo de nylon) y el manejo de trabajo bajo presión.</text:p>
      <text:p text:style-name="Estilo2">Prepararlos para posibles "Misiones Sorpresa" que ocurrirán en vivo.</text:p>
      <text:p text:style-name="P153">Estructura Base de la Master Class (Aplica para los 3 Niveles)</text:p>
      <text:p text:style-name="Estilo2">El tiempo (2 horas) se divide guiando a los estudiantes a través del proceso de diseño en tiempo real:</text:p>
      <text:p text:style-name="Estilo2"><text:span text:style-name="T154">Fase 1:</text:span><text:span text:style-name="T155"><text:s/></text:span>Entender e Idear (Diseño conceptual). Se les entrega el kit oficial. La regla es: "No peguen nada todavía". Se les da el problema (dimensiones, tipo de puente, meta de peso) y hacen bocetos rápidos.</text:p>
      <text:p text:style-name="Estilo2"><text:span text:style-name="T156">Fase 2:<text:s/></text:span>Prototipar (Teoría en Acción). Esta es la parte central. El mentor explica un concepto e inmediatamente los alumnos lo replican con sus paletas. Van armando las subestructuras de su puente final.</text:p>
      <text:p text:style-name="Estilo2">Si es posible que nos acompañe, una persona que apoye en el desarrollo técnico y experiencias (proyectos<text:s/>emblemáticos), separar los bloques por <text:s/>documentos, agenda de la master class, separar y presentar la agenda para las master<text:s/></text:p>
      <text:p text:style-name="P157">Clase Nivel 1: Tercer Ciclo (Puente de Viga)</text:p>
      <text:p text:style-name="Estilo2">Concepto 1: Tracción y Compresión.</text:p>
      <text:p text:style-name="P158">Dinámica en vivo: El mentor les pide que tomen una paleta y traten de estirarla (tracción) y luego de aplastarla desde los extremos (compresión). Explicar qué partes del puente sufren cada fuerza.</text:p>
      <text:p text:style-name="Estilo2">Concepto 2: La Magia de la Triangulación (Cerchas).</text:p>
      <text:p text:style-name="P159">Dinámica en vivo: Pídeles que armen un cuadrado con 4 paletas y un solo punto de silicón en las esquinas. Al empujarlo, se deformará. Luego, diles que crucen una paleta en diagonal formando dos triángulos. Al empujarlo, se mantendrá rígido. A partir de este momento, empiezan a ensamblar las cerchas laterales de su puente real aplicando este principio.</text:p>
      <text:p text:style-name="Estilo2">Concepto 3: Optimización de Juntas.</text:p>
      <text:p text:style-name="P160">Dinámica en vivo: Enseñarles que un exceso de silicón no hace el puente más fuerte, sino más pesado. Mostrar cómo hacer un empalme correcto entre dos paletas.</text:p>
      <text:p text:style-name="P161">Clase Nivel 2: Bachillerato (Puente de Arco)</text:p>
      <text:p text:style-name="Estilo2">Concepto 1: Distribución de Cargas y Empuje Lateral.</text:p>
      <text:p text:style-name="P162">Dinámica en vivo: Hacer que dos estudiantes se pongan frente a frente e inclinen su peso el uno contra el otro, juntando las manos (simulando un arco). Si uno quita las manos, el otro cae. Explicar cómo el arco transfiere el peso del centro hacia los apoyos laterales (los estribos).</text:p>
      <text:p text:style-name="Estilo2">Concepto 2: Construcción del Polígono (Simulación de Dovelas).</text:p>
      <text:p text:style-name="P163">Dinámica en vivo: Dado que no pueden curvar las paletas fácilmente, deben crear un "falso arco" usando polígonos. El mentor guía la construcción de la curva inferior del puente, enseñando a calcular los ángulos de corte o superposición de las paletas para que la curva sea suave y la fuerza no se concentre en un solo quiebre.</text:p>
      <text:p text:style-name="Estilo2">Concepto 3: El Tablero Colgante o Apoyado.</text:p>
      <text:p text:style-name="P164">Dinámica en vivo: Decidir si el camino vehicular irá por encima del arco o colgará de él usando el hilo de nylon. Empiezan a armar los soportes verticales que conectan el arco con la pista.</text:p>
      <text:p text:style-name="P165">Clase Nivel 3: Educación Superior (Puente Atirantado)</text:p>
      <text:p text:style-name="Estilo2">Concepto 1: Tensión en Cables y el Rol de la Torre (Pilono).</text:p>
      <text:p text:style-name="P166">Dinámica en vivo: Anclar un hilo de nylon a una paleta en la mesa y jalarlo en diagonal. Explicar cómo el hilo (en pura tensión) sostiene el tablero, mientras transfiere toda esa fuerza hacia abajo comprimiendo la torre principal.</text:p>
      <text:p text:style-name="Estilo2">Concepto 2: Equilibrio de Momentos.</text:p>
      <text:p text:style-name="P167">Dinámica en vivo: Empiezan a construir la torre principal. El mentor les demuestra que si ponen tensores (hilos) solo de un lado, la torre se va a volcar por el momento flector. Tienen que ir tensando los hilos de nylon de forma simétrica a ambos lados de la torre mientras construyen, simulando el proceso real de ingeniería donde el puente se construye "volando" desde el centro hacia afuera.</text:p>
      <text:p text:style-name="Estilo2">Concepto 3: Deflexión del Tablero.</text:p>
      <text:p text:style-name="P168">Dinámica en vivo: Enseñarles a usar el hilo para asegurar que la viga principal (de 1.5 metros, que es bastante larga) no se pandee en el centro, midiendo y ajustando la tensión de los tirantes uno por uno.</text:p>
      <text:p text:style-name="Estilo2"><text:span text:style-name="T169">Fase 3:<text:s/></text:span>La "Misión Sorpresa" (Manejo de presión). Justo cuando están concentrados armando, se detiene el reloj y se les lanza un reto inesperado con límite de tiempo.</text:p>
      <text:p text:style-name="Estilo2"><text:span text:style-name="T170">Fase 4:<text:s/></text:span>Evaluar (Pruebas de estrés y Feedback). Testean lo que llevan construido (quizás poniéndole libros encima a sus módulos) y el mentor da consejos de optimización de material.</text:p>
      <text:p text:style-name="P171">5. El Gran Evento: Competencia Bridge Master 2026</text:p>
      <text:p text:style-name="Estilo2">La culminación de la experiencia.</text:p>
      <text:p text:style-name="Estilo2">Fechas programadas: 15 de agosto de 2026 (Tentativo).</text:p>
      <text:p text:style-name="Estilo2">Ubicación: CUBO - Centro Urbano de Bienestar y Oportunidades, Colonia IVU.</text:p>
      <text:p text:style-name="Estilo2">Duración del Reto de Construcción: 2 horas y 30 minutos (Límite estricto en vivo).</text:p>
      <text:p text:style-name="Estilo2">Experiencia:</text:p>
      <text:p text:style-name="Estilo2">Construcción simultánea bajo presión usando únicamente los kits oficiales.</text:p>
      <text:p text:style-name="Estilo2">Grabación en vivo del Video Reel / TikTok (documentación del proceso).</text:p>
      <text:p text:style-name="Estilo2">Pruebas de peso con carga incremental hasta la muerte estructural para definir a los ganadores según su nivel.</text:p>
      <text:p text:style-name="Estilo2"/>
      <text:p text:style-name="Estilo2">Que se les recompenese como incentivo en las notas,<text:s/></text:p>
      <text:p text:style-name="P172"/>
      <text:h text:style-name="Estilo1" text:outline-level="1"><text:bookmark-start text:name="_Toc743050743"/>Bibliografía<text:bookmark-end text:name="_Toc743050743"/></text:h>
      <text:h text:style-name="Estilo1" text:outline-level="1"/>
      <text:p text:style-name="Estilo2"><text:a xlink:href="https://asset.pitsco.com/sharedimages/resources/46600-trussbridges-spanish.pdf" office:target-frame-name="_top" xlink:show="replace"><text:span text:style-name="Hipervínculo">https://asset.pitsco.com/sharedimages/resources/46600-trussbridges-spanish.pdf</text:span></text:a></text:p>
      <text:p text:style-name="Estilo2"><text:a xlink:href="https://garrettsbridges.com/category/photos/popsicle-bridges/" office:target-frame-name="_top" xlink:show="replace"><text:span text:style-name="Hipervínculo">https://garrettsbridges.com/category/photos/popsicle-bridges/</text:span></text:a></text:p>
      <text:p text:style-name="Estilo2"><text:a xlink:href="https://ifc.dpz.es/recursos/publicaciones/31/77/cap%2010_%20Los%20puentes.pdf" office:target-frame-name="_top" xlink:show="replace"><text:span text:style-name="Hipervínculo">https://ifc.dpz.es/recursos/publicaciones/31/77/cap%2010_%20Los%20puentes.pdf</text:span></text:a></text:p>
      <text:p text:style-name="Estilo2"><text:a xlink:href="https://alumni.umh.es/files/2026/02/Bases-Puentes-XXI-1.pdf" office:target-frame-name="_top" xlink:show="replace"><text:span text:style-name="Hipervínculo">https://alumni.umh.es/files/2026/02/Bases-Puentes-XXI-1.pdf</text:span></text:a></text:p>
      <text:p text:style-name="Estilo2"><text:a xlink:href="https://smis.org.mx/cnis2025/wp-content/uploads/imagenes/concurso-palitos-madera-BASES-vfinal.pdf" office:target-frame-name="_top" xlink:show="replace"><text:span text:style-name="Hipervínculo">https://smis.org.mx/cnis2025/wp-content/uploads/imagenes/concurso-palitos-madera-BASES-vfinal.pdf</text:span></text:a></text:p>
      <text:p text:style-name="Estilo2"><text:a xlink:href="https://compraco.com.br/es/blogs/construcao-civil/14-tipos-de-formas-estruturais-para-edificios-altos?srsltid=AfmBOoq77rxae3vHyD-voTvT-Xvg8usMf7yjQ8ylMIfuuph4rOCNTGsH" office:target-frame-name="_top" xlink:show="replace"><text:span text:style-name="Hipervínculo">https://compraco.com.br/es/blogs/construcao-civil/14-tipos-de-formas-estruturais-para-edificios-altos?srsltid=AfmBOoq77rxae3vHyD-voTvT-Xvg8usMf7yjQ8ylMIfuuph4rOCNTGsH</text:span></text:a></text:p>
      <text:p text:style-name="Estilo2"><text:a xlink:href="https://drive.google.com/file/d/1S8ufipSpNLL-KeQlGJ6mMxISJerzEmLr/view?usp=sharing" office:target-frame-name="_top" xlink:show="replace"><text:span text:style-name="Hipervínculo">https://drive.google.com/file/d/1S8ufipSpNLL-KeQlGJ6mMxISJerzEmLr/view?usp=sharing</text:span></text:a></text:p>
      <text:p text:style-name="Estilo2"><text:a xlink:href="https://drive.google.com/file/d/1wDpSMtUeBng4DWf76hZmgDVUyANk1gUZ/view?usp=sharing" office:target-frame-name="_top" xlink:show="replace">https://drive.google.com/file/d/1wDpSMtUeBng4DWf76hZmgDVUyANk1gUZ/view?usp=sharing</text:a></text:p>
      <text:p text:style-name="Estilo2"><text:a xlink:href="https://drive.google.com/file/d/1tHbSGwfc3fDIPRAoVBxUp2YmamGDtR92/view?usp=sharing" office:target-frame-name="_top" xlink:show="replace"><text:span text:style-name="Hipervínculo">https://drive.google.com/file/d/1tHbSGwfc3fDIPRAoVBxUp2YmamGDtR92/view?usp=sharing</text:span></text:a></text:p>
      <text:p text:style-name="Estilo2"/>
      <text:p text:style-name="Estilo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Black" svg:font-family="Arial Black" style:font-family-generic="swiss" style:font-pitch="variable" svg:panose-1="2 11 10 4 2 1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4916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SV"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Yu Gothic Light"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Yu Gothic Light"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Yu Gothic Light"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Yu Gothic Light"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Yu Gothic Light"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Yu Gothic Light" style:font-name-complex="Times New Roman" fo:color="#0F4761"/>
    </style:style>
    <style:style style:name="Título6Car" style:display-name="Título 6 Car" style:family="text" style:parent-style-name="Fuentedepárrafopredeter.">
      <style:text-properties style:font-name-asian="Yu Gothic Light"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Yu Gothic Light" style:font-name-complex="Times New Roman" fo:color="#595959"/>
    </style:style>
    <style:style style:name="Título8Car" style:display-name="Título 8 Car" style:family="text" style:parent-style-name="Fuentedepárrafopredeter.">
      <style:text-properties style:font-name-asian="Yu Gothic Light"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Yu Gothic Light"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Aptos Display" style:font-name-asian="Yu Gothic Light"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Yu Gothic Light"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Yu Gothic Light"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Encabezado" style:display-name="Encabezado"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PiedepáginaCar" style:display-name="Pie de página Car" style:family="text" style:parent-style-name="Fuentedepárrafopredeter."/>
    <style:style style:name="Textoindependiente" style:display-name="Texto independiente" style:family="paragraph" style:parent-style-name="Normal">
      <style:paragraph-properties fo:widows="0" fo:orphans="0" style:text-autospace="none" fo:margin-bottom="0in" fo:line-height="100%"/>
      <style:text-properties style:font-name="Verdana" style:font-name-asian="Verdana" style:font-name-complex="Verdana" style:letter-kerning="false" fo:language="es" fo:country="ES" fo:hyphenate="false"/>
    </style:style>
    <style:style style:name="TextoindependienteCar" style:display-name="Texto independiente Car" style:family="text" style:parent-style-name="Fuentedepárrafopredeter.">
      <style:text-properties style:font-name="Verdana" style:font-name-asian="Verdana" style:font-name-complex="Verdana" style:letter-kerning="false" fo:language="es" fo:country="ES"/>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style:language-asian="es" style:country-asian="SV" fo:hyphenate="false"/>
    </style:style>
    <style:style style:name="TítuloTDC" style:display-name="Título TDC" style:family="paragraph" style:parent-style-name="Título1" style:next-style-name="Normal">
      <style:paragraph-properties fo:margin-top="0.1666in" fo:margin-bottom="0in" fo:line-height="107%"/>
      <style:text-properties style:letter-kerning="false" fo:font-size="16pt" style:font-size-asian="16pt" style:font-size-complex="16pt" style:language-asian="es" style:country-asian="SV"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Estilo1" style:display-name="Estilo1" style:family="paragraph" style:parent-style-name="Título1" style:default-outline-level="1">
      <style:paragraph-properties fo:widows="0" fo:orphans="0" style:text-autospace="none" fo:margin-bottom="0in" fo:line-height="100%"/>
      <style:text-properties style:font-name="Arial Black" style:font-name-asian="Arial Black" style:font-name-complex="Arial Black" fo:font-weight="bold" style:font-weight-asian="bold" style:font-weight-complex="bold" fo:color="#1357A8" fo:letter-spacing="-0.0055in" style:letter-kerning="false" fo:font-size="16pt" style:font-size-asian="16pt" style:font-size-complex="16pt" fo:language="es" fo:country="ES" fo:hyphenate="false"/>
    </style:style>
    <style:style style:name="Estilo1Car" style:display-name="Estilo1 Car" style:family="text" style:parent-style-name="Fuentedepárrafopredeter.">
      <style:text-properties style:font-name="Arial Black" style:font-name-asian="Arial Black" style:font-name-complex="Arial Black" fo:font-weight="bold" style:font-weight-asian="bold" style:font-weight-complex="bold" fo:color="#1357A8" fo:letter-spacing="-0.0055in" style:letter-kerning="false" fo:font-size="16pt" style:font-size-asian="16pt" style:font-size-complex="16pt" fo:language="es" fo:country="ES"/>
    </style:style>
    <style:style style:name="Estilo2" style:display-name="Estilo2" style:family="paragraph" style:parent-style-name="Normal">
      <style:paragraph-properties fo:text-align="justify"/>
      <style:text-properties style:font-name="Verdana" style:font-name-asian="Verdana" style:font-name-complex="Verdana" fo:color="#231F20" style:letter-kerning="false" fo:language="es" fo:country="ES" fo:hyphenate="false"/>
    </style:style>
    <style:style style:name="Estilo2Car" style:display-name="Estilo2 Car" style:family="text" style:parent-style-name="Fuentedepárrafopredeter.">
      <style:text-properties style:font-name="Verdana" style:font-name-asian="Verdana" style:font-name-complex="Verdana" fo:color="#231F20" style:letter-kerning="false" fo:language="es" fo:country="ES"/>
    </style:style>
    <style:style style:name="Estilo3" style:display-name="Estilo3" style:family="paragraph" style:parent-style-name="Normal" style:default-outline-level="1">
      <style:paragraph-properties fo:widows="0" fo:orphans="0" style:text-autospace="none" fo:margin-top="0.0006in" fo:margin-bottom="0in" fo:line-height="100%" fo:margin-left="0.1888in">
        <style:tab-stops/>
      </style:paragraph-properties>
      <style:text-properties style:font-name="Arial Black" style:font-name-asian="Arial Black" style:font-name-complex="Arial Black" fo:color="#231F20" fo:letter-spacing="-0.0055in" style:letter-kerning="false" fo:font-size="15pt" style:font-size-asian="15pt" style:font-size-complex="15pt" fo:language="es" fo:country="ES" fo:hyphenate="false"/>
    </style:style>
    <style:style style:name="Estilo3Car" style:display-name="Estilo3 Car" style:family="text" style:parent-style-name="SubtítuloCar">
      <style:text-properties style:font-name="Arial Black" style:font-name-asian="Arial Black" style:font-name-complex="Arial Black" fo:color="#231F20" fo:letter-spacing="-0.0055in" style:letter-kerning="false" fo:font-size="15pt" style:font-size-asian="15pt" style:font-size-complex="15pt" fo:language="es" fo:country="E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4916in" fo:margin-left="0.7875in" fo:margin-bottom="0.4916in" fo:margin-right="0.7229in" style:num-format="1" style:writing-mode="lr-tb">
        <style:footnote-sep style:width="0.007in" style:rel-width="33%" style:color="#000000" style:line-style="solid" style:adjustment="left"/>
      </style:page-layout-properties>
      <style:header-style>
        <style:header-footer-properties style:dynamic-spacing="true" fo:min-height="0.8868in"/>
      </style:header-style>
      <style:footer-style>
        <style:header-footer-properties style:dynamic-spacing="true" fo:min-height="-0.393in"/>
      </style:footer-style>
    </style:page-layout>
    <style:style style:name="P2" style:parent-style-name="Encabezado" style:family="paragraph">
      <style:paragraph-properties>
        <style:tab-stops>
          <style:tab-stop style:type="center" style:position="3.0687in"/>
          <style:tab-stop style:type="left" style:position="3.2486in"/>
          <style:tab-stop style:type="right" style:position="6.1375in"/>
        </style:tab-stops>
      </style:paragraph-properties>
    </style:style>
    <style:style style:name="TableColumn4" style:family="table-column">
      <style:table-column-properties style:column-width="2.3298in"/>
    </style:style>
    <style:style style:name="TableColumn5" style:family="table-column">
      <style:table-column-properties style:column-width="2.3298in"/>
    </style:style>
    <style:style style:name="TableColumn6" style:family="table-column">
      <style:table-column-properties style:column-width="2.3298in"/>
    </style:style>
    <style:style style:name="Table3" style:family="table">
      <style:table-properties style:width="6.9895in" fo:margin-left="0in" table:align="left"/>
    </style:style>
    <style:style style:name="TableRow7" style:family="table-row">
      <style:table-row-properties style:min-row-height="0.2083in"/>
    </style:style>
    <style:style style:name="TableCell8" style:family="table-cell">
      <style:table-cell-properties fo:border="none" style:writing-mode="lr-tb" fo:padding-top="0in" fo:padding-left="0.075in" fo:padding-bottom="0in" fo:padding-right="0.075in"/>
    </style:style>
    <style:style style:name="P9" style:parent-style-name="Encabezado" style:family="paragraph">
      <style:paragraph-properties fo:margin-left="-0.0798in">
        <style:tab-stops>
          <style:tab-stop style:type="center" style:position="3.1486in"/>
          <style:tab-stop style:type="right" style:position="6.2173in"/>
        </style:tab-stops>
      </style:paragraph-properties>
    </style:style>
    <style:style style:name="TableCell10" style:family="table-cell">
      <style:table-cell-properties fo:border="none" style:writing-mode="lr-tb" fo:padding-top="0in" fo:padding-left="0.075in" fo:padding-bottom="0in" fo:padding-right="0.075in"/>
    </style:style>
    <style:style style:name="P11" style:parent-style-name="Encabezado" style:family="paragraph">
      <style:paragraph-properties fo:text-align="center"/>
    </style:style>
    <style:style style:name="TableCell12" style:family="table-cell">
      <style:table-cell-properties fo:border="none" style:writing-mode="lr-tb" fo:padding-top="0in" fo:padding-left="0.075in" fo:padding-bottom="0in" fo:padding-right="0.075in"/>
    </style:style>
    <style:style style:name="P13" style:parent-style-name="Encabezado" style:family="paragraph">
      <style:paragraph-properties fo:text-align="end" fo:margin-right="-0.0798in"/>
    </style:style>
    <style:style style:family="graphic" style:name="a0" style:parent-style-name="Graphics">
      <style:graphic-properties fo:border="none" fo:background-color="transparent" style:wrap="run-through" style:run-through="foreground" style:horizontal-rel="page-content" style:vertical-rel="paragraph" style:horizontal-pos="left" style:vertical-pos="from-top"/>
    </style:style>
    <style:style style:family="graphic" style:name="a1" style:parent-style-name="Graphics">
      <style:graphic-properties fo:border="0.01042in none" fo:background-color="transparent" style:wrap="run-through" style:run-through="foreground" fo:clip="rect(0.54489in, 1.04106in, 0.29874in, 0in)" style:horizontal-rel="page" style:vertical-rel="paragraph" style:horizontal-pos="center" style:vertical-pos="from-top"/>
    </style:style>
  </office:automatic-styles>
  <office:master-styles>
    <style:master-page style:name="MP0" style:page-layout-name="PL0">
      <style:header>
        <text:p text:style-name="P2"><draw:frame draw:z-index="251658241" draw:style-name="a0" draw:name="Gráfico 1" text:anchor-type="paragraph" svg:x="0in" svg:y="-0.0574in" svg:width="1.16667in" svg:height="0.36458in" style:rel-width="scale" style:rel-height="scale"><draw:image xlink:href="media/image1.png" xlink:type="simple" xlink:show="embed" xlink:actuate="onLoad"/><svg:title/><svg:desc/></draw:frame><draw:frame draw:z-index="251658240" draw:style-name="a1" draw:name="Gráfico 1" text:anchor-type="paragraph" svg:x="0in" svg:y="-0.54275in" svg:width="8.81859in" svg:height="1.17128in" style:rel-width="scale" style:rel-height="scale"><draw:image xlink:href="media/image3.png" xlink:type="simple" xlink:show="embed" xlink:actuate="onLoad"/><svg:title/><svg:desc/></draw:frame><text:s text:c="2"/></text:p>
      </style:header>
      <style:footer>
        <table:table table:style-name="Table3">
          <table:table-columns>
            <table:table-column table:style-name="TableColumn4"/>
            <table:table-column table:style-name="TableColumn5"/>
            <table:table-column table:style-name="TableColumn6"/>
          </table:table-columns>
          <table:table-row table:style-name="TableRow7">
            <table:table-cell table:style-name="TableCell8">
              <text:p text:style-name="P9"/>
            </table:table-cell>
            <table:table-cell table:style-name="TableCell10">
              <text:p text:style-name="P11"/>
            </table:table-cell>
            <table:table-cell table:style-name="TableCell12">
              <text:p text:style-name="P13"/>
            </table:table-cell>
          </table:table-row>
        </table:table>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ryssia Maritza Barriere de Obispo</meta:initial-creator>
    <dc:creator>Carlo Soham Villacorta Siguenza</dc:creator>
    <meta:creation-date>2026-07-07T23:48:00Z</meta:creation-date>
    <dc:date>2026-07-07T23:48:00Z</dc:date>
    <meta:print-date>2025-08-25T20:42:00Z</meta:print-date>
    <meta:template xlink:href="Normal.dotm" xlink:type="simple"/>
    <meta:editing-cycles>12</meta:editing-cycles>
    <meta:editing-duration>PT0S</meta:editing-duration>
    <meta:user-defined meta:name="ContentTypeId">0x010100AEFAFF83C918E64BAB3FA47A8984D115</meta:user-defined>
    <meta:user-defined meta:name="MSIP_Label_defa4170-0d19-0005-0001-bc88714345d2_Enabled">true</meta:user-defined>
    <meta:user-defined meta:name="MSIP_Label_defa4170-0d19-0005-0001-bc88714345d2_SetDate">2026-06-26T13:41:45Z</meta:user-defined>
    <meta:user-defined meta:name="MSIP_Label_defa4170-0d19-0005-0001-bc88714345d2_Method">Privileged</meta:user-defined>
    <meta:user-defined meta:name="MSIP_Label_defa4170-0d19-0005-0001-bc88714345d2_Name">defa4170-0d19-0005-0001-bc88714345d2</meta:user-defined>
    <meta:user-defined meta:name="MSIP_Label_defa4170-0d19-0005-0001-bc88714345d2_SiteId">14feb3b5-364b-4c9b-a136-abb271d6ee62</meta:user-defined>
    <meta:user-defined meta:name="MSIP_Label_defa4170-0d19-0005-0001-bc88714345d2_ActionId">814ed22d-92cd-41f8-81e6-82aec1f67e6a</meta:user-defined>
    <meta:user-defined meta:name="MSIP_Label_defa4170-0d19-0005-0001-bc88714345d2_ContentBits">0</meta:user-defined>
    <meta:user-defined meta:name="MSIP_Label_defa4170-0d19-0005-0001-bc88714345d2_Tag">10, 0, 1, 1</meta:user-defined>
    <meta:document-statistic meta:page-count="1" meta:paragraph-count="29" meta:word-count="2293" meta:character-count="14877" meta:row-count="105" meta:non-whitespace-character-count="12613"/>
  </office:meta>
</office:document-meta>
</file>